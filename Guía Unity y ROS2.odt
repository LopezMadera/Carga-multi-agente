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A00000228CF6B5EED.png" manifest:media-type="image/png"/>
  <manifest:file-entry manifest:full-path="Pictures/10000001000003CA0000022809CD28E3.png" manifest:media-type="image/png"/>
  <manifest:file-entry manifest:full-path="Pictures/10000001000003CA00000188B40D9686.png" manifest:media-type="image/png"/>
  <manifest:file-entry manifest:full-path="Pictures/1000000100000516000000F9E19C1BC2.png" manifest:media-type="image/png"/>
  <manifest:file-entry manifest:full-path="Pictures/1000000100000513000002D7D52915A1.png" manifest:media-type="image/png"/>
  <manifest:file-entry manifest:full-path="Pictures/10000001000001500000017EEF4E6C22.png" manifest:media-type="image/png"/>
  <manifest:file-entry manifest:full-path="Pictures/100000010000051B000002B6F626B0BC.png" manifest:media-type="image/png"/>
  <manifest:file-entry manifest:full-path="Pictures/10000001000002A9000002833B73142D.png" manifest:media-type="image/png"/>
  <manifest:file-entry manifest:full-path="Pictures/1000000100000516000002C6538822C7.png" manifest:media-type="image/png"/>
  <manifest:file-entry manifest:full-path="Pictures/100000010000050C000002CA51BB156E.png" manifest:media-type="image/png"/>
  <manifest:file-entry manifest:full-path="Pictures/100000010000050C000002CA4C8F9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officeooo:rsid="001cf7c5" officeooo:paragraph-rsid="001cf7c5" style:font-size-asian="24pt" style:font-size-complex="24pt"/>
    </style:style>
    <style:style style:name="P2" style:family="paragraph" style:parent-style-name="Standard" style:list-style-name="L1">
      <style:text-properties fo:font-size="15pt" officeooo:rsid="001d6136" officeooo:paragraph-rsid="001d6136" style:font-size-asian="15pt" style:font-size-complex="15pt"/>
    </style:style>
    <style:style style:name="P3" style:family="paragraph" style:parent-style-name="Standard">
      <style:text-properties fo:color="#2a6099" loext:opacity="100%" fo:font-size="18pt" officeooo:rsid="001f23ea" officeooo:paragraph-rsid="001f23ea" style:font-size-asian="18pt" style:font-size-complex="18pt"/>
    </style:style>
    <style:style style:name="P4" style:family="paragraph" style:parent-style-name="Standard">
      <style:text-properties fo:color="#355269" loext:opacity="100%" fo:font-size="18pt" officeooo:rsid="001d6136" officeooo:paragraph-rsid="001d6136" style:font-size-asian="18pt" style:font-size-complex="18pt"/>
    </style:style>
    <style:style style:name="P5" style:family="paragraph" style:parent-style-name="Standard">
      <style:text-properties fo:color="#000000" loext:opacity="100%" fo:font-size="15pt" officeooo:rsid="001d6136" officeooo:paragraph-rsid="001d6136" style:font-size-asian="15pt" style:font-size-complex="15pt"/>
    </style:style>
    <style:style style:name="P6" style:family="paragraph" style:parent-style-name="Standard">
      <style:text-properties fo:color="#000000" loext:opacity="100%" fo:font-size="15pt" officeooo:rsid="001f23ea" officeooo:paragraph-rsid="001f23ea" style:font-size-asian="15pt" style:font-size-complex="15pt"/>
    </style:style>
    <style:style style:name="P7" style:family="paragraph" style:parent-style-name="Standard">
      <style:text-properties fo:color="#000000" loext:opacity="100%" fo:font-size="15pt" officeooo:rsid="00205b57" officeooo:paragraph-rsid="00205b57" style:font-size-asian="15pt" style:font-size-complex="15pt"/>
    </style:style>
    <style:style style:name="P8" style:family="paragraph" style:parent-style-name="Standard">
      <style:text-properties fo:color="#000000" loext:opacity="100%" fo:font-size="15pt" officeooo:rsid="0020b7cb" officeooo:paragraph-rsid="0020b7cb" style:font-size-asian="15pt" style:font-size-complex="15pt"/>
    </style:style>
    <style:style style:name="P9" style:family="paragraph" style:parent-style-name="Standard">
      <style:text-properties fo:color="#000000" loext:opacity="100%" fo:font-size="15pt" officeooo:rsid="0020fa9f" officeooo:paragraph-rsid="0020fa9f" style:font-size-asian="15pt" style:font-size-complex="15pt"/>
    </style:style>
    <style:style style:name="P10" style:family="paragraph" style:parent-style-name="Standard">
      <style:text-properties fo:color="#000000" loext:opacity="100%" fo:font-size="15pt" officeooo:rsid="002101b9" officeooo:paragraph-rsid="002101b9" style:font-size-asian="15pt" style:font-size-complex="15pt"/>
    </style:style>
    <style:style style:name="P11" style:family="paragraph" style:parent-style-name="Standard">
      <style:text-properties fo:color="#000000" loext:opacity="100%" fo:font-size="15pt" officeooo:rsid="00222b9e" officeooo:paragraph-rsid="00222b9e" style:font-size-asian="15pt" style:font-size-complex="15pt"/>
    </style:style>
    <style:style style:name="P12" style:family="paragraph" style:parent-style-name="Standard">
      <style:text-properties fo:color="#000000" loext:opacity="100%" fo:font-size="15pt" officeooo:rsid="00242907" officeooo:paragraph-rsid="00242907" style:font-size-asian="15pt" style:font-size-complex="15pt"/>
    </style:style>
    <style:style style:name="P13" style:family="paragraph" style:parent-style-name="Standard">
      <style:text-properties fo:color="#000000" loext:opacity="100%" fo:font-size="15pt" officeooo:rsid="002542b2" officeooo:paragraph-rsid="002542b2" style:font-size-asian="15pt" style:font-size-complex="15pt"/>
    </style:style>
    <style:style style:name="P14" style:family="paragraph" style:parent-style-name="Standard">
      <style:text-properties fo:color="#000000" loext:opacity="100%" fo:font-size="15pt" officeooo:rsid="0026ce39" officeooo:paragraph-rsid="0026ce39" style:font-size-asian="15pt" style:font-size-complex="15pt"/>
    </style:style>
    <style:style style:name="P15" style:family="paragraph" style:parent-style-name="Standard">
      <style:text-properties fo:color="#3465a4" loext:opacity="100%" fo:font-size="18pt" officeooo:rsid="0020b7cb" officeooo:paragraph-rsid="0020b7cb" style:font-size-asian="18pt" style:font-size-complex="18pt"/>
    </style:style>
    <style:style style:name="P16" style:family="paragraph" style:parent-style-name="Standard">
      <style:text-properties fo:color="#3465a4" loext:opacity="100%" fo:font-size="18pt" officeooo:rsid="002101b9" officeooo:paragraph-rsid="002101b9" style:font-size-asian="18pt" style:font-size-complex="18pt"/>
    </style:style>
    <style:style style:name="P17" style:family="paragraph" style:parent-style-name="Standard">
      <style:text-properties fo:color="#3465a4" loext:opacity="100%" fo:font-size="18pt" officeooo:rsid="00242907" officeooo:paragraph-rsid="00242907" style:font-size-asian="18pt" style:font-size-complex="18pt"/>
    </style:style>
    <style:style style:name="T1" style:family="text">
      <style:text-properties officeooo:rsid="001f23ea"/>
    </style:style>
    <style:style style:name="T2" style:family="text">
      <style:text-properties officeooo:rsid="001f98cc"/>
    </style:style>
    <style:style style:name="T3" style:family="text">
      <style:text-properties officeooo:rsid="002504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Conexión Unity y Ros2</text:p>
      <text:p text:style-name="P4">Requisitos previos</text:p>
      <text:list text:style-name="L1">
        <text:list-item>
          <text:p text:style-name="P2">ROS2 instalado <text:span text:style-name="T1">(en este caso se utiliza Jazzy)</text:span></text:p>
        </text:list-item>
        <text:list-item>
          <text:p text:style-name="P2">Unity Hub – Unity Editor</text:p>
        </text:list-item>
        <text:list-item>
          <text:p text:style-name="P2">Python3</text:p>
        </text:list-item>
        <text:list-item>
          <text:p text:style-name="P2">Tener un workspace de ROS 2</text:p>
          <text:p text:style-name="P2"/>
        </text:list-item>
      </text:list>
      <text:p text:style-name="P4">Instalar ROS-TCP-Endpoint en ROS 2</text:p>
      <text:p text:style-name="P5">Este es el puente entre ROS2 y Unity.</text:p>
      <text:p text:style-name="P6">Para su instalación hay que copiar el repositorio de github que contiene todo lo necesario.</text:p>
      <text:p text:style-name="P6"/>
      <text:p text:style-name="P6">En una terminal ejecutar:</text:p>
      <text:p text:style-name="P6">cd ~/ros2_ws/src<text:line-break/>git clone https://github.com/Unity-Technologies/ROS-TCP-Endpoint.git</text:p>
      <text:p text:style-name="P5"/>
      <text:p text:style-name="P6">Una vez clonado hay que compilarlo en la terminal:</text:p>
      <text:p text:style-name="P6">cd ~/ros2_ws<text:line-break/>colcon build<text:line-break/>source install/setup.bash</text:p>
      <text:p text:style-name="P6"/>
      <text:p text:style-name="P6">Para ejecutar el endpoint que es el que se encarga de establecer la comunicación hay que ejecutar en una nueva terminal:</text:p>
      <text:p text:style-name="P6">source /opt/ros/jazzy/setup.bash</text:p>
      <text:p text:style-name="P6">source ~/ros2_ws/install/setup.bash</text:p>
      <text:p text:style-name="P6">ros2 run ros_tcp_endpoint default_server_endpoint</text:p>
      <text:p text:style-name="P6"/>
      <text:p text:style-name="P6">Este nodo abre un servidor TCP (por defecto puerto 10000)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Instalar Paquetes en Unity</text:p>
      <text:p text:style-name="P6">Abrir unity hub y en projects crear uno nuevo o abrir uno existente</text:p>
      <text:p text:style-name="P6"><draw:frame draw:style-name="fr2" draw:name="Imagen1" text:anchor-type="char" svg:width="17cm" svg:height="9.394cm" draw:z-index="0"><draw:image xlink:href="Pictures/100000010000050C000002CA4C8F9CDD.png" xlink:type="simple" xlink:show="embed" xlink:actuate="onLoad" draw:mime-type="image/png"/></draw:frame></text:p>
      <text:p text:style-name="P6">Para que Unity reconozca la comunicación con ROS 2 necesitamos el paquete ROS-TCP connector, <text:span text:style-name="T2">el cual se obtiene de un repositorio de github.</text:span></text:p>
      <text:p text:style-name="P6"/>
      <text:p text:style-name="P6"><draw:frame draw:style-name="fr1" draw:name="Imagen3" text:anchor-type="char" svg:width="17cm" svg:height="9.394cm" draw:z-index="1"><draw:image xlink:href="Pictures/100000010000050C000002CA51BB156E.png" xlink:type="simple" xlink:show="embed" xlink:actuate="onLoad" draw:mime-type="image/png"/></draw:frame></text:p>
      <text:p text:style-name="P7"><draw:frame draw:style-name="fr2" draw:name="Imagen2" text:anchor-type="char" svg:width="17cm" svg:height="16.051cm" draw:z-index="2"><draw:image xlink:href="Pictures/10000001000002A9000002833B73142D.png" xlink:type="simple" xlink:show="embed" xlink:actuate="onLoad" draw:mime-type="image/png"/></draw:frame><text:soft-page-break/></text:p>
      <text:p text:style-name="P7">Aquí se coloca el enlace del repositorio para instalarlo </text:p>
      <text:p text:style-name="P7"/>
      <text:p text:style-name="P7">https://github.com/Unity-Technologies/ROS-TCP-Connector.git?path=/com.unity.robotics.ros-tcp-connector</text:p>
      <text:p text:style-name="P7"/>
      <text:p text:style-name="P15">Establecer Conexión entre ROS 2 y Unity</text:p>
      <text:p text:style-name="P8">El endpoint que vimos anteriromente nos da un servidor por default, pero si queremos cambiar la dirección o asegurar que sea la correcta lo podemos verificar en la siguiente ventana:</text:p>
      <text:p text:style-name="P8"/>
      <text:p text:style-name="P8"/>
      <text:p text:style-name="P8"/>
      <text:p text:style-name="P8"/>
      <text:p text:style-name="P8"><draw:frame draw:style-name="fr2" draw:name="Imagen4" text:anchor-type="char" svg:width="17cm" svg:height="9.026cm" draw:z-index="3"><draw:image xlink:href="Pictures/100000010000051B000002B6F626B0BC.png" xlink:type="simple" xlink:show="embed" xlink:actuate="onLoad" draw:mime-type="image/png"/></draw:frame><text:soft-page-break/></text:p>
      <text:p text:style-name="P8"><draw:frame draw:style-name="fr3" draw:name="Imagen5" text:anchor-type="char" svg:width="8.89cm" svg:height="10.107cm" draw:z-index="4"><draw:image xlink:href="Pictures/10000001000001500000017EEF4E6C2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Hasta aquí lo único que hicimos fue habilitar la comunicación entre ROS 2 y Unity, sin embargo si queremos publicar o suscribirnos a un tópico necesitamos crear un script para cada una de estas tareas.</text:p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Enviar la imagen de una cámara</text:p>
      <text:p text:style-name="P10">Aquí utilizaremos un código previamente hecho para poder hacer el envío de una imagen como tópico, solo la vamos a publicar, y estos pasos se pueden hacer para “n” cámaras.</text:p>
      <text:p text:style-name="P10"/>
      <text:p text:style-name="P11">Creamos el script donde estara nuestro código para enviar imagen.</text:p>
      <text:p text:style-name="P11"/>
      <text:p text:style-name="P10"><draw:frame draw:style-name="fr1" draw:name="Imagen6" text:anchor-type="char" svg:width="17cm" svg:height="9.269cm" draw:z-index="5"><draw:image xlink:href="Pictures/1000000100000516000002C6538822C7.png" xlink:type="simple" xlink:show="embed" xlink:actuate="onLoad" draw:mime-type="image/png"/></draw:frame></text:p>
      <text:p text:style-name="P11">Lo nombramos CameraPublisher</text:p>
      <text:p text:style-name="P11"><draw:frame draw:style-name="fr1" draw:name="Imagen7" text:anchor-type="char" svg:width="17cm" svg:height="3.251cm" draw:z-index="6"><draw:image xlink:href="Pictures/1000000100000516000000F9E19C1BC2.png" xlink:type="simple" xlink:show="embed" xlink:actuate="onLoad" draw:mime-type="image/png"/></draw:frame></text:p>
      <text:p text:style-name="P11">Abrimos este archivo dando doble click, pegamos el código y guardamos lo cambios.</text:p>
      <text:p text:style-name="P11"/>
      <text:p text:style-name="P11">using UnityEngine;</text:p>
      <text:p text:style-name="P11">using Unity.Robotics.ROSTCPConnector;</text:p>
      <text:p text:style-name="P11"/>
      <text:p text:style-name="P11">using RosMessageTypes.Sensor;</text:p>
      <text:p text:style-name="P11">using RosMessageTypes.Std;</text:p>
      <text:p text:style-name="P11">using RosMessageTypes.BuiltinInterfaces;</text:p>
      <text:p text:style-name="P11"/>
      <text:p text:style-name="P11">public class CameraPublisher : MonoBehaviour</text:p>
      <text:p text:style-name="P11"><text:soft-page-break/>{</text:p>
      <text:p text:style-name="P11"><text:s text:c="4"/>public Camera cameraSensor;</text:p>
      <text:p text:style-name="P11"><text:s text:c="4"/>public RenderTexture renderTexture;</text:p>
      <text:p text:style-name="P11"/>
      <text:p text:style-name="P11"><text:s text:c="4"/>public string topicName = "/camera/image_raw";</text:p>
      <text:p text:style-name="P11"/>
      <text:p text:style-name="P11"><text:s text:c="4"/>ROSConnection ros;</text:p>
      <text:p text:style-name="P11"/>
      <text:p text:style-name="P11"><text:s text:c="4"/>Texture2D texture2D;</text:p>
      <text:p text:style-name="P11"/>
      <text:p text:style-name="P11"><text:s text:c="4"/>void Start()</text:p>
      <text:p text:style-name="P11"><text:s text:c="4"/>{</text:p>
      <text:p text:style-name="P11"><text:s text:c="8"/>ros = ROSConnection.GetOrCreateInstance();</text:p>
      <text:p text:style-name="P11"><text:s text:c="8"/>ros.RegisterPublisher&lt;ImageMsg&gt;(topicName);</text:p>
      <text:p text:style-name="P11"/>
      <text:p text:style-name="P11"><text:s text:c="8"/>texture2D = new Texture2D(</text:p>
      <text:p text:style-name="P11"><text:s text:c="12"/>renderTexture.width,</text:p>
      <text:p text:style-name="P11"><text:s text:c="12"/>renderTexture.height,</text:p>
      <text:p text:style-name="P11"><text:s text:c="12"/>TextureFormat.RGB24,</text:p>
      <text:p text:style-name="P11"><text:s text:c="12"/>false);</text:p>
      <text:p text:style-name="P11"/>
      <text:p text:style-name="P11"><text:s text:c="8"/>cameraSensor.targetTexture = renderTexture;</text:p>
      <text:p text:style-name="P11"/>
      <text:p text:style-name="P11"><text:s text:c="8"/>InvokeRepeating(nameof(PublishImage), 1.0f, 0.1f); <text:s text:c="2"/>//10 Hz</text:p>
      <text:p text:style-name="P11"><text:s text:c="4"/>}</text:p>
      <text:p text:style-name="P11"/>
      <text:p text:style-name="P11"><text:s text:c="4"/>void PublishImage()</text:p>
      <text:p text:style-name="P11"><text:s text:c="4"/>{</text:p>
      <text:p text:style-name="P11"><text:s text:c="8"/>RenderTexture.active = renderTexture;</text:p>
      <text:p text:style-name="P11"/>
      <text:p text:style-name="P11"><text:s text:c="8"/>texture2D.ReadPixels(</text:p>
      <text:p text:style-name="P11"><text:s text:c="12"/>new Rect(0, 0, renderTexture.width, renderTexture.height),</text:p>
      <text:p text:style-name="P11"><text:s text:c="12"/>0,</text:p>
      <text:p text:style-name="P11"><text:s text:c="12"/>0);</text:p>
      <text:p text:style-name="P11"/>
      <text:p text:style-name="P11"><text:s text:c="8"/>texture2D.Apply();</text:p>
      <text:p text:style-name="P11"/>
      <text:p text:style-name="P11"><text:s text:c="8"/>byte[] imageData = texture2D.GetRawTextureData();</text:p>
      <text:p text:style-name="P11"/>
      <text:p text:style-name="P11"><text:s text:c="8"/>double time = Time.time;</text:p>
      <text:p text:style-name="P11"/>
      <text:p text:style-name="P11"><text:s text:c="8"/>int sec = (int)time;</text:p>
      <text:p text:style-name="P11"><text:soft-page-break/><text:s text:c="8"/>uint nanosec = (uint)((time - sec) * 1000000000);</text:p>
      <text:p text:style-name="P11"/>
      <text:p text:style-name="P11"><text:s text:c="8"/>HeaderMsg header = new HeaderMsg(</text:p>
      <text:p text:style-name="P11"><text:s text:c="12"/>new TimeMsg(sec, nanosec),</text:p>
      <text:p text:style-name="P11"><text:s text:c="12"/>"camera"</text:p>
      <text:p text:style-name="P11"><text:s text:c="8"/>);</text:p>
      <text:p text:style-name="P11"/>
      <text:p text:style-name="P11"><text:s text:c="8"/>ImageMsg image = new ImageMsg(</text:p>
      <text:p text:style-name="P11"><text:s text:c="12"/>header,</text:p>
      <text:p text:style-name="P11"><text:s text:c="12"/>(uint)renderTexture.height,</text:p>
      <text:p text:style-name="P11"><text:s text:c="12"/>(uint)renderTexture.width,</text:p>
      <text:p text:style-name="P11"><text:s text:c="12"/>"rgb8",</text:p>
      <text:p text:style-name="P11"><text:s text:c="12"/>0,</text:p>
      <text:p text:style-name="P11"><text:s text:c="12"/>(uint)(renderTexture.width * 3),</text:p>
      <text:p text:style-name="P11"><text:s text:c="12"/>imageData</text:p>
      <text:p text:style-name="P11"><text:s text:c="8"/>);</text:p>
      <text:p text:style-name="P11"/>
      <text:p text:style-name="P11"><text:s text:c="8"/>ros.Publish(topicName, image);</text:p>
      <text:p text:style-name="P11"/>
      <text:p text:style-name="P11"><text:s text:c="8"/>RenderTexture.active = null;</text:p>
      <text:p text:style-name="P11"><text:s text:c="4"/>}</text:p>
      <text:p text:style-name="P11">}</text:p>
      <text:p text:style-name="P11"/>
      <text:p text:style-name="P17">Generación de la imagen que se va a enviar</text:p>
      <text:p text:style-name="P12">Para poder comunicar la imagen necesitamos crear la textura en la que la cámara dibujara lo que esta viendo. </text:p>
      <text:p text:style-name="P12">Vamos a crear un Render Texture, este sera exclusivo para cada cámara, de manera que si queremos agregar mas cámaras tenemos que repetir este paso para cada una.</text:p>
      <text:p text:style-name="P12"><draw:frame draw:style-name="fr3" draw:name="Imagen8" text:anchor-type="char" svg:width="17cm" svg:height="9.514cm" draw:z-index="7"><draw:image xlink:href="Pictures/1000000100000513000002D7D52915A1.png" xlink:type="simple" xlink:show="embed" xlink:actuate="onLoad" draw:mime-type="image/png"/></draw:frame><text:soft-page-break/></text:p>
      <text:p text:style-name="P11"/>
      <text:p text:style-name="P12">Lo nombramos de manera que sea fácil rel<text:span text:style-name="T3">acionarlo con la cámara a la que lo vamos a asignar.</text:span></text:p>
      <text:p text:style-name="P13">Configruar la camara</text:p>
      <text:p text:style-name="P13">Seleccionamos la camara y abrimos el inspector, en la parte de Output Texture arrastramos la textura que creamos en el paso anterior</text:p>
      <text:p text:style-name="P13"><draw:frame draw:style-name="fr1" draw:name="Imagen9" text:anchor-type="char" svg:width="17cm" svg:height="6.869cm" draw:z-index="8"><draw:image xlink:href="Pictures/10000001000003CA00000188B40D9686.png" xlink:type="simple" xlink:show="embed" xlink:actuate="onLoad" draw:mime-type="image/png"/></draw:frame></text:p>
      <text:p text:style-name="P13">Añadimos el archivo CameraPublisher desde el inspector dando click en Add Component.</text:p>
      <text:p text:style-name="P13"><draw:frame draw:style-name="fr2" draw:name="Imagen10" text:anchor-type="char" svg:width="17cm" svg:height="9.673cm" draw:z-index="9"><draw:image xlink:href="Pictures/10000001000003CA0000022809CD28E3.png" xlink:type="simple" xlink:show="embed" xlink:actuate="onLoad" draw:mime-type="image/png"/></draw:frame><text:soft-page-break/></text:p>
      <text:p text:style-name="P13">Configuramos el CameraPublisher</text:p>
      <text:p text:style-name="P13"><draw:frame draw:style-name="fr1" draw:name="Imagen11" text:anchor-type="char" svg:width="17cm" svg:height="9.673cm" draw:z-index="10"><draw:image xlink:href="Pictures/10000001000003CA00000228CF6B5EED.png" xlink:type="simple" xlink:show="embed" xlink:actuate="onLoad" draw:mime-type="image/png"/></draw:frame></text:p>
      <text:p text:style-name="P14">seleccionamos la cámara que vamos a usar, la textura de la cámara, y el nombre del topico.</text:p>
      <text:p text:style-name="P14"/>
      <text:p text:style-name="P14">Y estamos listos para presionar play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11:31:45.874300875</meta:creation-date>
    <dc:date>2026-06-25T16:39:13.068081508</dc:date>
    <meta:editing-duration>PT1H3M17S</meta:editing-duration>
    <meta:editing-cycles>7</meta:editing-cycles>
    <meta:generator>LibreOffice/24.2.7.2$Linux_X86_64 LibreOffice_project/420$Build-2</meta:generator>
    <meta:document-statistic meta:table-count="0" meta:image-count="11" meta:object-count="0" meta:page-count="9" meta:paragraph-count="95" meta:word-count="565" meta:character-count="4397" meta:non-whitespace-character-count="3546"/>
  </office:meta>
</office:document-meta>
</file>
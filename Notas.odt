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e16f" officeooo:paragraph-rsid="000de16f"/>
    </style:style>
    <style:style style:name="P2" style:family="paragraph" style:parent-style-name="Standard">
      <style:text-properties officeooo:rsid="000e37d3" officeooo:paragraph-rsid="000e37d3"/>
    </style:style>
    <style:style style:name="P3" style:family="paragraph" style:parent-style-name="Standard" style:list-style-name="L1">
      <style:text-properties officeooo:rsid="000de16f" officeooo:paragraph-rsid="000de16f"/>
    </style:style>
    <style:style style:name="P4" style:family="paragraph" style:parent-style-name="Standard" style:list-style-name="L2">
      <style:text-properties officeooo:rsid="000de16f" officeooo:paragraph-rsid="000de16f"/>
    </style:style>
    <style:style style:name="P5" style:family="paragraph" style:parent-style-name="Standard" style:list-style-name="L3">
      <style:text-properties officeooo:rsid="000de16f" officeooo:paragraph-rsid="000de16f"/>
    </style:style>
    <style:style style:name="P6" style:family="paragraph" style:parent-style-name="Standard">
      <style:text-properties officeooo:rsid="000de16f" officeooo:paragraph-rsid="00162634"/>
    </style:style>
    <style:style style:name="P7" style:family="paragraph" style:parent-style-name="Standard" style:list-style-name="L4">
      <style:text-properties officeooo:rsid="000e37d3" officeooo:paragraph-rsid="000e37d3"/>
    </style:style>
    <style:style style:name="P8" style:family="paragraph" style:parent-style-name="Standard" style:list-style-name="L5">
      <style:text-properties officeooo:rsid="000e37d3" officeooo:paragraph-rsid="000e37d3"/>
    </style:style>
    <style:style style:name="P9" style:family="paragraph" style:parent-style-name="Standard" style:list-style-name="L6">
      <style:text-properties officeooo:rsid="000e37d3" officeooo:paragraph-rsid="000e37d3"/>
    </style:style>
    <style:style style:name="P10" style:family="paragraph" style:parent-style-name="Standard" style:list-style-name="L7">
      <style:text-properties officeooo:rsid="000e37d3" officeooo:paragraph-rsid="000e37d3"/>
    </style:style>
    <style:style style:name="P11" style:family="paragraph" style:parent-style-name="Standard">
      <style:text-properties officeooo:rsid="000e37d3" officeooo:paragraph-rsid="000e37d3"/>
    </style:style>
    <style:style style:name="P12" style:family="paragraph" style:parent-style-name="Standard">
      <style:text-properties officeooo:rsid="000e37d3" officeooo:paragraph-rsid="00162634"/>
    </style:style>
    <style:style style:name="P13" style:family="paragraph" style:parent-style-name="Standard">
      <style:text-properties officeooo:rsid="00162634" officeooo:paragraph-rsid="00162634"/>
    </style:style>
    <style:style style:name="P14" style:family="paragraph" style:parent-style-name="Standard">
      <style:text-properties officeooo:rsid="00168d02" officeooo:paragraph-rsid="00168d02"/>
    </style:style>
    <style:style style:name="P15" style:family="paragraph" style:parent-style-name="Standard" style:list-style-name="L11">
      <style:text-properties officeooo:rsid="00168d02" officeooo:paragraph-rsid="00168d02"/>
    </style:style>
    <style:style style:name="P16" style:family="paragraph" style:parent-style-name="Standard" style:list-style-name="L17">
      <style:text-properties officeooo:rsid="00168d02" officeooo:paragraph-rsid="00168d02"/>
    </style:style>
    <style:style style:name="P17" style:family="paragraph" style:parent-style-name="Standard" style:list-style-name="L18">
      <style:text-properties officeooo:rsid="00168d02" officeooo:paragraph-rsid="00168d02"/>
    </style:style>
    <style:style style:name="P18" style:family="paragraph" style:parent-style-name="Standard">
      <style:text-properties officeooo:paragraph-rsid="00168d02"/>
    </style:style>
    <style:style style:name="P19" style:family="paragraph" style:parent-style-name="Standard">
      <style:text-properties fo:font-size="16pt" officeooo:paragraph-rsid="00168d02" style:font-size-asian="16pt" style:font-size-complex="16pt"/>
    </style:style>
    <style:style style:name="T1" style:family="text">
      <style:text-properties officeooo:rsid="00162634"/>
    </style:style>
    <style:style style:name="T2" style:family="text">
      <style:text-properties officeooo:rsid="00168d02"/>
    </style:style>
    <style:style style:name="T3" style:family="text">
      <style:text-properties officeooo:rsid="000de1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Cargar entorno ros2</text:p>
        </text:list-item>
      </text:list>
      <text:p text:style-name="P1"/>
      <text:p text:style-name="P1">source /opt/ros/jazzy/setup.bash</text:p>
      <text:p text:style-name="P1">source ~/ros2_ws/install/setup.bash</text:p>
      <text:p text:style-name="P1"/>
      <text:list text:style-name="L2">
        <text:list-item>
          <text:p text:style-name="P4">comprobar utilizando</text:p>
        </text:list-item>
      </text:list>
      <text:p text:style-name="P1"/>
      <text:p text:style-name="P1">ros2 topic list</text:p>
      <text:p text:style-name="P1"/>
      <text:list text:style-name="L3">
        <text:list-item>
          <text:p text:style-name="P5">Iniciar el servidor TCP que es el medio de coneccion entre ros2 y unity</text:p>
        </text:list-item>
      </text:list>
      <text:p text:style-name="P1"/>
      <text:p text:style-name="P1">source /opt/ros/jazzy/setup.bash</text:p>
      <text:p text:style-name="P1">source ~/ros2_ws/install/setup.bash</text:p>
      <text:p text:style-name="P1"/>
      <text:p text:style-name="P1">ros2 run ros_tcp_endpoint default_server_endpoint</text:p>
      <text:p text:style-name="P1"/>
      <text:p text:style-name="P1"/>
      <text:list text:style-name="L4">
        <text:list-item>
          <text:p text:style-name="P7">Cargar work space</text:p>
        </text:list-item>
      </text:list>
      <text:p text:style-name="P2"/>
      <text:p text:style-name="P2">source /opt/ros/jazzy/setup.bash</text:p>
      <text:p text:style-name="P2"/>
      <text:p text:style-name="P2">cd ~/ros2_ws</text:p>
      <text:p text:style-name="P2"/>
      <text:p text:style-name="P2">source install/setup.bash</text:p>
      <text:p text:style-name="P1"/>
      <text:list text:style-name="L5">
        <text:list-item>
          <text:p text:style-name="P8">en caso de modificar algo</text:p>
          <text:p text:style-name="P8"/>
        </text:list-item>
      </text:list>
      <text:p text:style-name="P2">colcon build</text:p>
      <text:p text:style-name="P2">source install/setup.bash</text:p>
      <text:p text:style-name="P1"/>
      <text:list text:style-name="L6">
        <text:list-item>
          <text:p text:style-name="P9">Ejecutar nodos</text:p>
        </text:list-item>
      </text:list>
      <text:p text:style-name="P2"/>
      <text:p text:style-name="P2">source /opt/ros/jazzy/setup.bash</text:p>
      <text:p text:style-name="P2"/>
      <text:p text:style-name="P2">cd ~/ros2_ws</text:p>
      <text:p text:style-name="P2"/>
      <text:p text:style-name="P2">source install/setup.bash</text:p>
      <text:p text:style-name="P2"/>
      <text:p text:style-name="P2">ros2 run camera_viewer image_viewer</text:p>
      <text:p text:style-name="P13">ros2 run camera_control camera_pose_publisher</text:p>
      <text:p text:style-name="P2"/>
      <text:list text:style-name="L7">
        <text:list-item>
          <text:p text:style-name="P10">Abrir rqt graph</text:p>
        </text:list-item>
      </text:list>
      <text:p text:style-name="P2"/>
      <text:p text:style-name="P2">source /opt/ros/jazzy/setup.bash</text:p>
      <text:p text:style-name="P2">source ~/ros2_ws/install/setup.bash</text:p>
      <text:p text:style-name="P2"/>
      <text:p text:style-name="P2">rqt_graph</text:p>
      <text:p text:style-name="P2"/>
      <text:p text:style-name="P2"/>
      <text:p text:style-name="P2"/>
      <text:p text:style-name="P2"/>
      <text:p text:style-name="P2"/>
      <text:p text:style-name="P19"><text:soft-page-break/><text:span text:style-name="T1">Pasos simulación</text:span></text:p>
      <text:p text:style-name="P18"><text:span text:style-name="T2">1.-</text:span><text:span text:style-name="T1">Abrir </text:span><text:span text:style-name="T2">en </text:span><text:span text:style-name="T1"><text:s/>Unity </text:span><text:span text:style-name="T2">Hub</text:span><text:span text:style-name="T1"> </text:span><text:span text:style-name="T2">Archivo My project</text:span></text:p>
      <text:p text:style-name="P18"/>
      <text:p text:style-name="P18"><text:span text:style-name="T2">2.-</text:span><text:span text:style-name="T1">Iniciar conección TCP</text:span></text:p>
      <text:p text:style-name="P18"/>
      <text:list text:style-name="L11">
        <text:list-item>
          <text:p text:style-name="P15">Terminal 1 (Establece la conección entre unity y el entorno de ROS)</text:p>
        </text:list-item>
      </text:list>
      <text:p text:style-name="P6">source /opt/ros/jazzy/setup.bash</text:p>
      <text:p text:style-name="P6">source ~/ros2_ws/install/setup.bash</text:p>
      <text:p text:style-name="P6"/>
      <text:p text:style-name="P18"><text:span text:style-name="T3">ros2 run ros_tcp_endpoint default_server_endpoint</text:span></text:p>
      <text:p text:style-name="P18"/>
      <text:p text:style-name="P18"><text:span text:style-name="T2">3.-</text:span><text:span text:style-name="T1">Ejecutar nodos </text:span></text:p>
      <text:list text:style-name="L17">
        <text:list-item>
          <text:p text:style-name="P16">Terminal 2 (este nodo solamente es para tomar la imagen enviada por el topico, por lo que es opcional)</text:p>
        </text:list-item>
      </text:list>
      <text:p text:style-name="P6">source /opt/ros/jazzy/setup.bash</text:p>
      <text:p text:style-name="P6">source ~/ros2_ws/install/setup.bash</text:p>
      <text:p text:style-name="P6"/>
      <text:p text:style-name="P12">ros2 run camera_viewer image_viewer</text:p>
      <text:p text:style-name="P12"/>
      <text:list text:style-name="L18">
        <text:list-item>
          <text:p text:style-name="P17">Terminal 3 (este nodo envia las poses a la camara principal)</text:p>
        </text:list-item>
      </text:list>
      <text:p text:style-name="P6">source /opt/ros/jazzy/setup.bash</text:p>
      <text:p text:style-name="P6">source ~/ros2_ws/install/setup.bash</text:p>
      <text:p text:style-name="P6"/>
      <text:p text:style-name="P13">ros2 run camera_control camera_pose_publisher</text:p>
      <text:p text:style-name="P13"/>
      <text:p text:style-name="P14">4.-Presionar boton de play en uni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09:44:56.581202803</meta:creation-date>
    <meta:generator>LibreOffice/24.2.7.2$Linux_X86_64 LibreOffice_project/420$Build-2</meta:generator>
    <dc:date>2026-06-22T11:23:00.110244720</dc:date>
    <meta:editing-duration>PT2H21M</meta:editing-duration>
    <meta:editing-cycles>4</meta:editing-cycles>
    <meta:document-statistic meta:table-count="0" meta:image-count="0" meta:object-count="0" meta:page-count="2" meta:paragraph-count="44" meta:word-count="173" meta:character-count="1414" meta:non-whitespace-character-count="1293"/>
  </office:meta>
</office:document-meta>
</file>